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6cm"/>
    </style:style>
    <style:style style:name="co2" style:family="table-column">
      <style:table-column-properties fo:break-before="auto" style:column-width="4.19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53.185cm"/>
    </style:style>
    <style:style style:name="co6" style:family="table-column">
      <style:table-column-properties fo:break-before="auto" style:column-width="29.579cm"/>
    </style:style>
    <style:style style:name="co7" style:family="table-column">
      <style:table-column-properties fo:break-before="auto" style:column-width="78.322cm"/>
    </style:style>
    <style:style style:name="co8" style:family="table-column">
      <style:table-column-properties fo:break-before="auto" style:column-width="1.3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7.435cm" fo:break-before="auto" style:use-optimal-row-height="fals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9.529cm" fo:break-before="auto" style:use-optimal-row-height="true"/>
    </style:style>
    <style:style style:name="ro15" style:family="table-row">
      <style:table-row-properties style:row-height="6.38cm" fo:break-before="auto" style:use-optimal-row-height="true"/>
    </style:style>
    <style:style style:name="ro16" style:family="table-row">
      <style:table-row-properties style:row-height="8.345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2cfee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dceaf7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1001"/>
          <loext:transformation loext:type="lumoff" loext:value="8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ceaf7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1001"/>
          <loext:transformation loext:type="lumoff" loext:value="8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c2f1c8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2cfee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11" table:default-cell-style-name="ce7"/>
        <table:table-column table:style-name="co8" table:number-columns-repeated="16266"/>
        <table:table-row table:style-name="ro1">
          <table:table-cell table:style-name="ce1" office:value-type="string" calcext:value-type="string">
            <text:p>Slave ID (HEX)</text:p>
          </table:table-cell>
          <table:table-cell table:style-name="ce1" office:value-type="string" calcext:value-type="string">
            <text:p>Function Code (HEX)</text:p>
          </table:table-cell>
          <table:table-cell table:style-name="ce1" office:value-type="string" calcext:value-type="string">
            <text:p>Sender Device</text:p>
          </table:table-cell>
          <table:table-cell table:style-name="ce1" office:value-type="string" calcext:value-type="string">
            <text:p>Responding Device</text:p>
          </table:table-cell>
          <table:table-cell table:style-name="ce1" office:value-type="string" calcext:value-type="string">
            <text:p>Request Message (HEX)</text:p>
          </table:table-cell>
          <table:table-cell table:style-name="ce1" office:value-type="string" calcext:value-type="string">
            <text:p>Response Message (HEX)</text:p>
          </table:table-cell>
          <table:table-cell table:style-name="ce1" office:value-type="string" calcext:value-type="string">
            <text:p>Note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 0 0 12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 0 0 12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18 00 20 (CRC C4 26)</text:p>
          </table:table-cell>
          <table:table-cell table:style-name="ce8" office:value-type="string" calcext:value-type="string">
            <text:p>40 00 02 00 02 00 0E 00 2E 03 YY 0D ZZ 00 00 00 00 00 F8 00 00 00 00 00 00 00 00 00 00 00 00 00 00 00 00 00 00 00 00 00 1D 2E B1 00 00 00 00 00 00 00 00 30 XX 00 00 00 00 00 00 WW QQ UU RR 00 TT</text:p>
            <text:p>XX = Running fan speed</text:p>
            <text:p>YY = Unknown (Observed BB, D1, D2, D3, D4) (D1-D4 slow increment over time)</text:p>
            <text:p>ZZ = Unknown (Observed 1A, 37, 38)</text:p>
            <text:p>WW = 0x10 When off, 0x10 + Fan Speed when running. Example: 15 = Cooler/FAN 5, 16 = Cooler/FAN 6</text:p>
            <text:p>QQ = 1 when off, 4 when cooler starting or fan running, then 14, then 16 when running (possible pump / water state?) 5 when Fan running.</text:p>
            <text:p>UU= 0 Possible Water Salinity Sensor – Only increases from 0 when cooler is run, maintains and slowly drops. Immediate drop to 0 after triggering manual drain (tested once).</text:p>
            <text:p>RR = 0 When Off/Fan Mode, various values when Cooler running.</text:p>
            <text:p>TT = 0 When Off/Fan Mode, slowly increments when cooler running.</text:p>
            <text:p/>
            <text:p>Offline:</text:p>
            <text:p>40 00 02 00 02 00 0E 00 2E 03 BB 0D 1A 00 00 00 00 00 F8 00 00 00 00 00 00 00 00 00 00 00 00 00 00 00 00 00 00 00 00 00 1D 2E B1 00 00 00 00 00 00 00 00 30 00 00 00 00 00 00 00 10 01 00 00 00 00</text:p>
            <text:p>Variable seems to stay when idle, Bytes 11 and 13 observed changes.</text:p>
          </table:table-cell>
          <table:table-cell table:style-name="ce10" office:value-type="string" calcext:value-type="string">
            <text:p>Status request from CP1 to AC Unit</text:p>
          </table:table-cell>
          <table:table-cell table:number-columns-repeated="111"/>
          <table:table-cell table:style-name="ce7" table:number-columns-repeated="16266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1D 00 01</text:p>
          </table:table-cell>
          <table:table-cell table:style-name="ce8" office:value-type="string" calcext:value-type="string">
            <text:p>02 0D XX</text:p>
            <text:p>Observed:</text:p>
            <text:p>02 0D 1A</text:p>
            <text:p>02 0D 37</text:p>
            <text:p>02 0D 20</text:p>
            <text:p>02 0D 23</text:p>
            <text:p>02 0D 3B</text:p>
            <text:p>02 0E CB – Cooler Speed 6</text:p>
            <text:p>02 0E CE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35 00 01</text:p>
          </table:table-cell>
          <table:table-cell table:style-name="ce8" office:value-type="string" calcext:value-type="string">
            <text:p>2 10 XX</text:p>
            <text:p>2 10 0</text:p>
            <text:p>2 10 1</text:p>
            <text:p>2 16 16</text:p>
            <text:p>2 13 16</text:p>
            <text:p>2 15 16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00 00 12 (CRC C5 F4)</text:p>
          </table:table-cell>
          <table:table-cell table:style-name="ce8" office:value-type="string" calcext:value-type="string">
            <text:p><text:span text:style-name="T1">24 10 34 20 10 5A 45 00 51 00 9B 00 00 00 </text:span><text:span text:style-name="T2">SS SS SS</text:span><text:span text:style-name="T3"> 00 02 00 03 10 6D 00 00 00 00 00 00 00 00 00 42 01 09 81 58</text:span></text:p>
            <text:p><text:span text:style-name="T1">24 10 34 20 10 MM MM MM MM 00 MM 00 00 00 SS SS SS 00 02 00 WW WW WW 00 00 00 00 00 00 00 00 00 42 01 09 81 58</text:span></text:p>
          </table:table-cell>
          <table:table-cell table:style-name="ce8" office:value-type="string" calcext:value-type="string">
            <text:p>TYPE: EVAPORATIVE COOLER </text:p>
            <text:p>MODEL: BREEZAIR EZQ 155 – MM (2-Byte Reversal)</text:p>
            <text:p>SERIAL NO - SS</text:p>
            <text:p>Last Running State:– Not included in message, fan or cooler mode does not change response.</text:p>
            <text:p>S/W VERSION: 20R0813 – WW (0x031062 = 200813 = 20R0813)"</text:p>
          </table:table-cell>
          <table:table-cell table:number-columns-repeated="111"/>
          <table:table-cell table:style-name="ce7" table:number-columns-repeated="1626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8" office:value-type="string" calcext:value-type="string">
            <text:p>00 31 00 01 02 30 XX</text:p>
            <text:p/>
            <text:p>Observed with Fan On:</text:p>
            <text:p>00 31 00 01 02 30 20</text:p>
            <text:p>00 31 00 01 02 30 30</text:p>
            <text:p/>
            <text:p>With cooler on (pump on, drain closed)</text:p>
            <text:p>00 31 00 01 02 30 52 (speed 5)</text:p>
            <text:p>00 31 00 01 02 30 62 (speed 6)</text:p>
            <text:p/>
            <text:p>Off:</text:p>
            <text:p>00 31 00 01 02 30 00</text:p>
          </table:table-cell>
          <table:table-cell table:style-name="ce10" office:value-type="string" calcext:value-type="string">
            <text:p>00 31 00 01</text:p>
          </table:table-cell>
          <table:table-cell table:style-name="ce8" office:value-type="string" calcext:value-type="string">
            <text:p>XX = Fan Speed, 10 = Speed 1, 20 = Speed 2 ect, +2 for Cooler Mode. +1 when drain open.</text:p>
            <text:p>Appears to be command used by panel to trigger aircon unit.</text:p>
          </table:table-cell>
          <table:table-cell table:number-columns-repeated="111"/>
          <table:table-cell table:style-name="ce7" table:number-columns-repeated="16266"/>
        </table:table-row>
        <table:table-row table:style-name="ro7">
          <table:table-cell table:style-name="ce10" office:value-type="string" calcext:value-type="string">
            <text:p>8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 6F 0 B</text:p>
          </table:table-cell>
          <table:table-cell table:style-name="ce8" office:value-type="string" calcext:value-type="string">
            <text:p>16 2 B2 1 66 0 0 0 0 0 0 0 0 0 0 0 0 0 0 0 4 0 10</text:p>
            <text:p>16 2 B2 1 66 0 0 0 0 0 0 0 0 0 0 0 0 0 0 0 4 0 11</text:p>
            <text:p>16 2 B2 1 66 0 0 0 0 0 0 0 0 0 0 0 0 0 0 0 4 0 12</text:p>
            <text:p>16 2 B2 1 66 0 0 0 0 0 0 0 0 0 0 0 0 0 0 0 4 0 13</text:p>
            <text:p>16 2 B2 1 66 0 0 0 0 0 0 0 0 0 0 0 0 0 0 0 4 0 14</text:p>
            <text:p>16 2 B2 1 66 0 0 0 0 0 0 0 0 0 0 0 0 0 0 0 4 0 15</text:p>
            <text:p>16 2 B2 1 66 0 0 0 0 0 0 0 0 0 0 0 0 0 0 0 4 0 16</text:p>
            <text:p>16 2 B2 1 66 0 0 0 0 0 0 0 0 0 0 0 0 0 0 0 4 0 17</text:p>
            <text:p>16 2 B2 1 66 0 0 0 0 0 0 0 0 0 0 0 0 0 0 0 4 0 18</text:p>
            <text:p>16 2 B2 1 66 0 0 0 0 0 0 0 0 0 0 0 0 0 0 0 4 0 19</text:p>
            <text:p>16 2 B2 1 66 0 0 0 0 0 0 0 0 0 0 0 0 0 0 0 4 0 1A</text:p>
            <text:p>16 2 B2 1 66 0 0 0 0 0 0 0 0 0 0 0 0 0 0 0 4 0 1B</text:p>
            <text:p>16 2 B2 1 66 0 0 0 0 0 0 0 0 0 0 0 0 0 0 0 4 0 F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8">
          <table:table-cell table:style-name="ce10" office:value-type="string" calcext:value-type="string">
            <text:p>8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4 00 3B</text:p>
          </table:table-cell>
          <table:table-cell table:style-name="ce10" office:value-type="string" calcext:value-type="string">
            <text:p><text:span text:style-name="T1">8D 03 64 08 A0 00 00 00 00 00 8D 00 00 00 00 00 00 00 00 00 00 3A 30 00 00 02 B2 01 66 00 00 00 00 00 00 00 00 00 00 00 00 00 00 00 04 00 21 1E 40 51 54 00 00 00 00 00</text:span><text:span text:style-name="T2"> SS SS SS</text:span><text:span text:style-name="T3"> 04 00 00 00 00 00 00 00 00 00 00 00 00 00 00 00 00 00 00 00 00 00 00 00 00 00 00 00 00 00 00 00 00 00 00 00 00 00 81 09 00 00 04 04</text:span></text:p>
          </table:table-cell>
          <table:table-cell table:style-name="ce8" office:value-type="string" calcext:value-type="string">
            <text:p><text:span text:style-name="T1">Query and response occurred when going to About Heater information section on CP1.</text:span></text:p>
            <text:p/>
            <text:p><text:span text:style-name="T1">Returned info:</text:span></text:p>
            <text:p><text:span text:style-name="T1">Type: GAS DUCTED HEATER</text:span></text:p>
            <text:p><text:span text:style-name="T1">Model: BRAEMAR HEATING TQ420N</text:span></text:p>
            <text:p><text:span text:style-name="T1">SERIAL: </text:span><text:span text:style-name="T2">SSSSSS</text:span></text:p>
            <text:p><text:span text:style-name="T1">S/W Version: V1.09</text:span></text:p>
            <text:p><text:span text:style-name="T1">DATA TABLE VERSION: D0.00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9">
          <table:table-cell table:style-name="ce10" office:value-type="string" calcext:value-type="string">
            <text:p>8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94 00 07</text:p>
          </table:table-cell>
          <table:table-cell table:style-name="ce8" office:value-type="string" calcext:value-type="string">
            <text:p>0E 00 00 04 04 04 04 04 04 00 04 00 00 69 A8</text:p>
            <text:p/>
            <text:p>Observed when heater running history requested:</text:p>
            <text:p>C 2 B2 1 66 0 0 0 0 0 0 0 0</text:p>
            <text:p/>
            <text:p>On Fault log request:</text:p>
            <text:p>3C 4 4 4 4 4 4 0 4 0 0 69 A8 71 85 19 32 0 0 81 4 2C C1 29 73 B 23 9D 26 6D CC BA 60 B8 3A 9B EC 28 B4 45 90 5E F3 B 53 6F E4 C2 E3 5F E4 F1 D1 3 70 F5 53 F7 3 3E 5B</text:p>
          </table:table-cell>
          <table:table-cell table:style-name="ce10" office:value-type="string" calcext:value-type="string">
            <text:p>Diagnostic info request to heater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3 00 02 04 10 XX 08 A0</text:p>
          </table:table-cell>
          <table:table-cell table:style-name="ce10" office:value-type="string" calcext:value-type="string">
            <text:p>00 63 00 02</text:p>
          </table:table-cell>
          <table:table-cell table:style-name="ce10" office:value-type="string" calcext:value-type="string">
            <text:p>XX = 00 When Idle, C1 When Fan mode on recycle speed 1, also seen 80 after turned off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E 00 01 02 00 00</text:p>
          </table:table-cell>
          <table:table-cell table:style-name="ce10" office:value-type="string" calcext:value-type="string">
            <text:p>00 6E 00 01</text:p>
          </table:table-cell>
          <table:table-cell table:style-name="ce10" office:value-type="string" calcext:value-type="string">
            <text:p>Possible Heater Heartbeat – Need to check frequency</text:p>
          </table:table-cell>
          <table:table-cell table:number-columns-repeated="111"/>
          <table:table-cell table:style-name="ce7" table:number-columns-repeated="16266"/>
        </table:table-row>
        <table:table-row table:style-name="ro10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8" office:value-type="string" calcext:value-type="string">
            <text:p>0 9B 0 2 4 XX YY</text:p>
            <text:p>Variable Entry: XX YY – Seems to be linked to number of seconds – or internal flame sensor temp?</text:p>
            <text:p>Observed responses:</text:p>
            <text:p>0 9B 0 2 4 0 24 2C F2</text:p>
            <text:p>0 9B 0 2 4 0 45 2C F2</text:p>
            <text:p>0 9B 0 2 4 0 67 2C F2</text:p>
            <text:p>0 9B 0 2 4 0 88 2C F2</text:p>
            <text:p>0 9B 0 2 4 0 AA 2C F2</text:p>
            <text:p>0 9B 0 2 4 0 CA 2C F2</text:p>
            <text:p>0 9B 0 2 4 0 EC 2C F2</text:p>
            <text:p>0 9B 0 2 4 1 2F 2C F2</text:p>
          </table:table-cell>
          <table:table-cell table:style-name="ce8" office:value-type="string" calcext:value-type="string">
            <text:p>0 9B 0 2</text:p>
            <text:p/>
          </table:table-cell>
          <table:table-cell table:style-name="ce10" office:value-type="string" calcext:value-type="string">
            <text:p>Information update from CP1 - unsure of what.</text:p>
          </table:table-cell>
          <table:table-cell table:number-columns-repeated="111"/>
          <table:table-cell table:style-name="ce7" table:number-columns-repeated="16266"/>
        </table:table-row>
        <table:table-row table:style-name="ro1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10" office:value-type="string" calcext:value-type="string">
            <text:p>00 CD 00 02</text:p>
          </table:table-cell>
          <table:table-cell table:style-name="ce8" office:value-type="string" calcext:value-type="string">
            <text:p>04 00 00 00 00</text:p>
            <text:p/>
          </table:table-cell>
          <table:table-cell table:style-name="ce8"/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ntrol Panel 1</text:p>
          </table:table-cell>
          <table:table-cell table:style-name="ce3" office:value-type="string" calcext:value-type="string">
            <text:p>Control Panel 2</text:p>
          </table:table-cell>
          <table:table-cell table:style-name="ce3" office:value-type="string" calcext:value-type="string">
            <text:p>00 E5 00 01</text:p>
          </table:table-cell>
          <table:table-cell table:style-name="ce16" office:value-type="string" calcext:value-type="string">
            <text:p>02 XX 00</text:p>
            <text:p>02 19 11 (CRC: 3B C5)</text:p>
          </table:table-cell>
          <table:table-cell table:style-name="ce16" office:value-type="string" calcext:value-type="string">
            <text:p>XX = Temp in Zone 2 (untested but matched at 0x14 = 20C)</text:p>
            <text:p/>
            <text:p>Fan Speed in code:</text:p>
            <text:p>00 CD 00 02 04 00 XX 00 A8   Where XX = Fan speed.</text:p>
            <text:p/>
            <text:p/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2</text:p>
          </table:table-cell>
          <table:table-cell table:style-name="ce10"/>
          <table:table-cell table:style-name="ce10" office:value-type="string" calcext:value-type="string">
            <text:p>22 00 00 00 00 4F 44 4E 57 54 53 49 41 53 52 00 00 00 00 00 00 00 00 00 00 00 00 00 00 00 53 00 00 03 E9</text:p>
          </table:table-cell>
          <table:table-cell table:style-name="ce10"/>
          <table:table-cell table:style-name="ce10" office:value-type="string" calcext:value-type="string">
            <text:p>Startup Code</text:p>
          </table:table-cell>
          <table:table-cell table:number-columns-repeated="111"/>
          <table:table-cell table:style-name="ce7" table:number-columns-repeated="16266"/>
        </table:table-row>
        <table:table-row table:style-name="ro10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10" office:value-type="string" calcext:value-type="string">
            <text:p>00 C7 00 05 0A XX XX YY YY 30 52 ZZ ZZ 80 00</text:p>
          </table:table-cell>
          <table:table-cell table:style-name="ce8" office:value-type="string" calcext:value-type="string">
            <text:p>00 C7 00 05</text:p>
            <text:p>Observed Queries:</text:p>
            <text:p>00 C7 00 05 0A EF 2C 2D 09 30 52 00 00 80 00</text:p>
            <text:p>00 C7 00 05 0A EF 19 2D 09 30 52 00 00 80 00</text:p>
            <text:p>00 C7 00 05 0A EF 20 2D 09 30 52 00 00 80 00</text:p>
            <text:p>00 C7 00 05 0A EF 26 2D 09 30 52 00 00 80 00</text:p>
            <text:p>00 C7 00 05 0A EF 2C 2D 09 30 52 00 00 80 00</text:p>
            <text:p>00 C7 00 05 0A E0 BF 2C FC 30 52 64 00 80 00</text:p>
            <text:p>00 C7 00 05 0A FF D2 2C F2 30 52 64 00 80 00</text:p>
            <text:p>00 C7 00 05 0A FF D8 2C F2 30 52 64 00 80 00</text:p>
            <text:p>00 C7 00 05 0A FF DF 2C F2 30 52 64 00 80 00</text:p>
          </table:table-cell>
          <table:table-cell table:style-name="ce8" office:value-type="string" calcext:value-type="string">
            <text:p>Control panel 2 uptime.</text:p>
            <text:p>00C7 = First register for time update.</text:p>
            <text:p>0005 = Registers to Write</text:p>
            <text:p>0A = 10 Bytes.</text:p>
            <text:p>XXXX = Seconds</text:p>
            <text:p>YYYY = Seconds Multiplier</text:p>
            <text:p>ZZZZ = Unknown Usage 6400 or 0000 Observed.</text:p>
            <text:p/>
            <text:p>Time is calculated by YYYY Dec Value x 65535 + XXXX Dec Value</text:p>
            <text:p>Time start 1/1/2000 02:55:00 Approx. – odd start time.</text:p>
          </table:table-cell>
          <table:table-cell table:number-columns-repeated="111"/>
          <table:table-cell table:style-name="ce7" table:number-columns-repeated="16266"/>
        </table:table-row>
        <table:table-row table:style-name="ro12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8" office:value-type="string" calcext:value-type="string">
            <text:p>00 CD 00 02 04 00 XX 00 A8</text:p>
            <text:p/>
            <text:p>Observed Queries:</text:p>
            <text:p>00 CD 00 02 04 00 06 00 A8</text:p>
          </table:table-cell>
          <table:table-cell table:style-name="ce10" office:value-type="string" calcext:value-type="string">
            <text:p>00 CD 00 02</text:p>
          </table:table-cell>
          <table:table-cell table:style-name="ce10" office:value-type="string" calcext:value-type="string">
            <text:p>XX = Zone 1 Max Fan Speed</text:p>
          </table:table-cell>
          <table:table-cell table:number-columns-repeated="111"/>
          <table:table-cell table:style-name="ce7" table:number-columns-repeated="16266"/>
        </table:table-row>
        <table:table-row table:style-name="ro1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8" office:value-type="string" calcext:value-type="string">
            <text:p>00 EF 00 02 04 02 X7 00 00</text:p>
            <text:p>00 EF 00 02 04 02 C6 00 15 (CRC: 7E 67)</text:p>
          </table:table-cell>
          <table:table-cell table:style-name="ce10" office:value-type="string" calcext:value-type="string">
            <text:p>00 EF 00 02</text:p>
          </table:table-cell>
          <table:table-cell table:style-name="ce10" office:value-type="string" calcext:value-type="string">
            <text:p>X7 = Increments when IOT command received, matches command number sent by IOT Module in EB 10 1A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1 2C 0 8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 table:number-columns-repeated="3"/>
          <table:table-cell table:style-name="ce10" office:value-type="string" calcext:value-type="string">
            <text:p>Occurs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 FB 0 6 </text:p>
          </table:table-cell>
          <table:table-cell table:style-name="ce10" office:value-type="string" calcext:value-type="string">
            <text:p>C 3 1 FF FF FF FF FF FF FF FF 0 0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FA 00 01 02 00 03 50 9E</text:p>
          </table:table-cell>
          <table:table-cell table:style-name="ce10" office:value-type="string" calcext:value-type="string">
            <text:p>00 FA 00 01</text:p>
          </table:table-cell>
          <table:table-cell table:style-name="ce10" office:value-type="string" calcext:value-type="string">
            <text:p>may need to be re-checked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/>
          <table:table-cell table:style-name="ce10" office:value-type="string" calcext:value-type="string">
            <text:p>0 FA 0 7</text:p>
          </table:table-cell>
          <table:table-cell table:style-name="ce10"/>
          <table:table-cell table:style-name="ce10" office:value-type="string" calcext:value-type="string">
            <text:p>Response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/>
          <table:table-cell table:style-name="ce10" office:value-type="string" calcext:value-type="string">
            <text:p>0 FA 0 7</text:p>
          </table:table-cell>
          <table:table-cell table:style-name="ce10"/>
          <table:table-cell table:style-name="ce10" office:value-type="string" calcext:value-type="string">
            <text:p>Response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FA 00 01 02 00 XX</text:p>
          </table:table-cell>
          <table:table-cell table:style-name="ce10" office:value-type="string" calcext:value-type="string">
            <text:p>00 FA 00 01</text:p>
          </table:table-cell>
          <table:table-cell table:style-name="ce10" office:value-type="string" calcext:value-type="string">
            <text:p>XX = 1 or 0, observed 0 offline, 1 with control panel alone.</text:p>
          </table:table-cell>
          <table:table-cell table:number-columns-repeated="111"/>
          <table:table-cell table:style-name="ce7" table:number-columns-repeated="16266"/>
        </table:table-row>
        <table:table-row table:style-name="ro13">
          <table:table-cell table:style-name="ce10" office:value-type="string" calcext:value-type="string">
            <text:p>E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2 58 00 12 (CRC: 53 66)</text:p>
          </table:table-cell>
          <table:table-cell table:style-name="ce8" office:value-type="string" calcext:value-type="string">
            <text:p>24 00 XX YY YY YY YY 00 00 00 00 00 00 00 00 00 00 00 00 00 00 00 00 00 00 00 00 00 00 00 00 00 00 00 00 04 00</text:p>
            <text:p>24 00 00 52 4D 32 48 00 00 00 00 00 00 00 00 00 00 00 00 00 00 00 00 00 00 00 00 00 00 00 00 00 00 00 00 04 00 (CRC: 83 35)</text:p>
          </table:table-cell>
          <table:table-cell table:style-name="ce8" office:value-type="string" calcext:value-type="string">
            <text:p>EB not observed while IOT module is connected with account not logged in.</text:p>
            <text:p>XX Values: 21 = WiFi Disconnected, 00 = Connected</text:p>
            <text:p>YY Values = SSID Name (2 byte pairs reversed, example is MRH2)</text:p>
          </table:table-cell>
          <table:table-cell table:number-columns-repeated="111"/>
          <table:table-cell table:style-name="ce7" table:number-columns-repeated="16266"/>
        </table:table-row>
        <table:table-row table:style-name="ro14">
          <table:table-cell table:style-name="ce4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ntrol Panel 1</text:p>
          </table:table-cell>
          <table:table-cell table:style-name="ce4" office:value-type="string" calcext:value-type="string">
            <text:p>IOT</text:p>
          </table:table-cell>
          <table:table-cell table:style-name="ce4" office:value-type="string" calcext:value-type="string">
            <text:p>0B 0C 00 0D (CRC 50 E2)</text:p>
          </table:table-cell>
          <table:table-cell table:style-name="ce17" office:value-type="string" calcext:value-type="string">
            <text:p>1A x1 x2 x3 x4 x5 x6 x7 x8 00 x10 00 x12 00 x14 00 00 00 14 00 00 00 00 00 00 00 00</text:p>
            <text:p>1A 02 9F 21 11 42 43 04 A2 00  24 00  24 00 01 00 00 00 12 00 00 00 00 00 00 00 00 (CRC: 86 E3)</text:p>
          </table:table-cell>
          <table:table-cell table:style-name="ce32" office:value-type="string" calcext:value-type="string">
            <text:p><text:span text:style-name="T4">Control Message from IOT Module</text:span></text:p>
            <text:p/>
            <text:p><text:span text:style-name="T1">X1, X2 = 2 Byte pair Increases +1 on each command received</text:span></text:p>
            <text:p/>
            <text:p><text:span text:style-name="T1">X3 = -db value of wireless signal strength. (Shows -68db or lower if disconnected)</text:span></text:p>
            <text:p/>
            <text:p><text:span text:style-name="T1">X4 – 10 = On, 11 = Off System On/Off</text:span></text:p>
            <text:p/>
            <text:p><text:span text:style-name="T1">X5 – Cooler Mode Enable/Disable 0x42 = Off, 0x02 = Enabled (Fan speed Mode), 0x22 = Enabled (Temp Mode)</text:span></text:p>
            <text:p><text:span text:style-name="T1">0x43 observed +/- 1 value unknown link</text:span></text:p>
            <text:p/>
            <text:p><text:span text:style-name="T1">X6 – Evap Unit Fan Settings (Code = 41 + Fan speed x 2) +2 for fan increase, -2 for fan speed decrease</text:span></text:p>
            <text:p><text:span text:style-name="T1">42 While recycle fan mode enabled (-1 When Recycle Mode Enabled)</text:span></text:p>
            <text:p><text:span text:style-name="T1">In Temp Mode x5 x6 are 2 byte pair 0x22 0x80 for 20C : +/- 20 for temp changes per degree.</text:span></text:p>
            <text:p><text:span text:style-name="T1">+80 increase occurs but unsure why (occurred while running ext fan)</text:span></text:p>
            <text:p/>
            <text:p><text:span text:style-name="T1">X7/X8 – 2 Byte Pair – Heater Settings</text:span></text:p>
            <text:p><text:span text:style-name="T1">Swapping to cooler mode from ext fan -20</text:span></text:p>
            <text:p><text:span text:style-name="T1">Swapping to ext fan to cooler mode +20</text:span></text:p>
            <text:p><text:span text:style-name="T1">Value doesn’t change on ext fan mode when changing speeds.</text:span></text:p>
            <text:p><text:span text:style-name="T1">0x02 - Cooler Mode</text:span></text:p>
            <text:p><text:span text:style-name="T1">0x22 - External Fan Mode</text:span></text:p>
            <text:p><text:span text:style-name="T1">0x23 - Recycle fan speed 1</text:span></text:p>
            <text:p><text:span text:style-name="T1">0x25 - Recycle fan speed 2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5">
          <table:table-cell table:style-name="ce4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8"/>
          <table:table-cell table:style-name="ce33" office:value-type="string" calcext:value-type="string">
            <text:p/>
            <text:p>+0x40 = +1 Degree, 0 Degrees = 02 C3 (Start index)</text:p>
            <text:p/>
            <text:p>Fan External Mode - 0xA2</text:p>
            <text:p>Cooler Mode - 0x82</text:p>
            <text:p>Swapping to cooler mode from ext fan -20</text:p>
            <text:p>Swapping to ext fan to cooler mode +20</text:p>
            <text:p>Value doesn’t change on ext fan mode when changing speeds.</text:p>
            <text:p/>
            <text:p>X10, X12 - Cooler Temperature Target = Temp x2 eg 0x30 = 24C</text:p>
            <text:p/>
            <text:p>X14 - Zone Control +/- 1 = Zone 1 (Upstairs), +/- 2 Zone 2 (Downstairs)""""</text:p>
            <text:p/>
            <text:p>X15 = 0x00 (Guessing zone 4)</text:p>
            <text:p>X16 = 0x00 (Guessing zone 3)</text:p>
            <text:p>X17 = Zone 2 Temp (heater)</text:p>
            <text:p>X18 = Zone 1 Temp (Heater)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3 E4 00 05 (CRC: D3 70)</text:p>
          </table:table-cell>
          <table:table-cell table:style-name="ce8" office:value-type="string" calcext:value-type="string">
            <text:p>0A VV VV VV VV ZZ XX YY WW UU QQ</text:p>
          </table:table-cell>
          <table:table-cell table:style-name="ce8" office:value-type="string" calcext:value-type="string">
            <text:p><text:span text:style-name="T1">Version: </text:span><text:span text:style-name="T2">VV </text:span><text:span text:style-name="T3">and IOT Unit MAC address:</text:span><text:span text:style-name="T2"> XX-ZZ-WW-YY-QQ-UU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03 E4 00 06 CRC: 93 71</text:p>
          </table:table-cell>
          <table:table-cell table:style-name="ce8" office:value-type="string" calcext:value-type="string">
            <text:p>0A VV VV VV VV ZZ XX YY WW UU QQ 00 00</text:p>
          </table:table-cell>
          <table:table-cell table:style-name="ce8" office:value-type="string" calcext:value-type="string">
            <text:p>Same as above, only seen during testing with control panel alone with wifi module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5 D8 0 23 46 0 1 0 49 50 55 54 53 49 41 53 52 0 0 0 0 0 0 0 0 0 0 0 0 4F 44 4F 44 4E 57 54 53 49 41 53 52 0 0 0 0 0 0 0 0 0 0 4F 5A 4F 5A 45 4E 33 20 0 0 0 0 0 0 0 0 0 0 0 0 0 0 4F 5A</text:p>
          </table:table-cell>
          <table:table-cell table:style-name="ce10" office:value-type="string" calcext:value-type="string">
            <text:p>5 D8 0 23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5 FB 0 21 42 4F 5A 45 4E 34 20 0 0 0 0 0 0 0 0 0 0 0 0 0 0 4F 5A 4F 5A 45 4E 35 20 0 0 0 0 0 0 0 0 0 0 0 0 0 0 4F 5A 4F 5A 45 4E 36 20 0 0 0 0 0 0 0 0 0 0 0 0 0 0 4F 5A</text:p>
          </table:table-cell>
          <table:table-cell table:style-name="ce10" office:value-type="string" calcext:value-type="string">
            <text:p>5 FB 0 21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1C 0 2C 58 4F 5A 45 4E 37 20 0 0 0 0 0 0 0 0 0 0 0 0 0 0 4F 5A 4F 5A 45 4E 38 20 0 0 0 0 0 0 0 0 0 0 0 0 0 0 4F 5A 4F 5A 45 4E 39 20 0 0 0 0 0 0 0 0 0 0 0 0 0 0 4F 5A 4F 5A 45 4E 31 20 0 30 0 0 0 0 0 0 0 0 0 0 0 0 4F 43</text:p>
          </table:table-cell>
          <table:table-cell table:style-name="ce10" office:value-type="string" calcext:value-type="string">
            <text:p>6 1C 0 2C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48 0 4 8 0 40 0 0 0 0 0 0</text:p>
          </table:table-cell>
          <table:table-cell table:style-name="ce10" office:value-type="string" calcext:value-type="string">
            <text:p>6 48 0 4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6 4C 00 38 70 00 05 17 44 45 5A 51 20 31 35 35 00 00 00 00 00 00 00 00 02 00 03 10 6D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  <table:table-cell table:style-name="ce10" office:value-type="string" calcext:value-type="string">
            <text:p>6 4C 0 38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84 0 2A 54 0 0 0 0 0 0 0 0 0 0 0 0 0 0 0 0 0 0 0 0 0 0 0 0 0 0 0 0 0 0 0 0 0 0 0 0 0 0 0 0 0 0 0 0 0 0 0 0 0 0 0 0 0 0 0 0 0 0 0 0 0 0 0 0 0 0 0 0 0 0 0 0 0 0 0 0 0 0 0 0 0 0 0 0</text:p>
          </table:table-cell>
          <table:table-cell table:style-name="ce10" office:value-type="string" calcext:value-type="string">
            <text:p>6 84 0 2A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AE 0 2A 54 0 0 0 0 0 0 0 0 0 0 0 0 0 0 0 0 0 0 0 0 0 0 0 0 0 0 0 0 0 0 0 0 0 0 0 0 0 0 0 0 0 0 0 0 0 0 0 0 0 0 0 0 0 0 0 0 0 0 0 0 0 0 0 0 0 0 0 0 0 0 0 0 0 0 0 0 0 0 0 0 0 0 0 0</text:p>
          </table:table-cell>
          <table:table-cell table:style-name="ce10" office:value-type="string" calcext:value-type="string">
            <text:p>6 AE 0 2A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3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D8 0 19 32 4 XX 0 0 12 1C 0 A0 54 51 34 33 30 4E 0 0 0 0 0 0 0 0 0 0 0 3 1E 8D 0 8D 81 9 69 A8 0 0 0 YY 3 8A 0 1 12 1C 0 F4 12 1C 0 12</text:p>
          </table:table-cell>
          <table:table-cell table:style-name="ce8" office:value-type="string" calcext:value-type="string">
            <text:p>6 D8 0 19</text:p>
            <text:p/>
          </table:table-cell>
          <table:table-cell table:style-name="ce8" office:value-type="string" calcext:value-type="string">
            <text:p>Observed value changes:</text:p>
            <text:p>XX = 50, YY = 25</text:p>
            <text:p>XX = 34, YY = 23</text:p>
          </table:table-cell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5" office:value-type="string" calcext:value-type="string">
            <text:p>EB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ntrol Panel 1</text:p>
          </table:table-cell>
          <table:table-cell table:style-name="ce5" office:value-type="string" calcext:value-type="string">
            <text:p>IOT</text:p>
          </table:table-cell>
          <table:table-cell table:style-name="ce11" office:value-type="string" calcext:value-type="string">
            <text:p>08 E5 00 01 02 X1 X2</text:p>
            <text:p>08 E5 00 01 02 00 00 (Observed While System Off)</text:p>
            <text:p>08 E5 00 01 02 00 01 (Observed While System ON)</text:p>
          </table:table-cell>
          <table:table-cell table:style-name="ce11" office:value-type="string" calcext:value-type="string">
            <text:p>08 E5 00 01 (CRC: 04 94)</text:p>
          </table:table-cell>
          <table:table-cell table:style-name="ce11" office:value-type="string" calcext:value-type="string">
            <text:p><text:span text:style-name="T1">X1,X2 = Changes on On/Off</text:span></text:p>
            <text:p><text:span text:style-name="T1">Value increments +10 when changed by Control Panel.</text:span></text:p>
            <text:p><text:span text:style-name="T1">1 For On</text:span></text:p>
            <text:p><text:span text:style-name="T1">0 For Off</text:span></text:p>
            <text:p/>
            <text:p><text:span text:style-name="T4">Appears to be command from CP1 to Turn On/Off IOT State and indicate panel settings change.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6">
          <table:table-cell table:style-name="ce6" office:value-type="string" calcext:value-type="string">
            <text:p>E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ntrol Panel 1</text:p>
          </table:table-cell>
          <table:table-cell table:style-name="ce6" office:value-type="string" calcext:value-type="string">
            <text:p>IOT</text:p>
          </table:table-cell>
          <table:table-cell table:style-name="ce25" office:value-type="string" calcext:value-type="string">
            <text:p>08 E6 00 32 64 00 00 00 CF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0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0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1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1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2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2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3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3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4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/>
            <text:p>Older software control panel:</text:p>
            <text:p>08 E6 00 34 68 00 00 01 13 10 27 01 6A 00 3C 00 00 FF 99 00 02 00 02 00 36 00 06 00 A3 02 7C 00 00 00 73 00 00 00 00 00 00 00 16 00 00 00 00 00 00 00 00 00 00 00 00 00 00 00 00 00 00 00 00 00 00 00 00 00 00 00 58 00 58 00 00 00 00 00 01 00 01 00 00 00 00 1B 16 00 00 00 00 00 00 00 00 00 00 00 00 00 00 00 00 00 00 1B 16 00 00 CRC: 5F DF</text:p>
            <text:p/>
          </table:table-cell>
          <table:table-cell table:style-name="ce6" office:value-type="string" calcext:value-type="string">
            <text:p>08 E6 00 32</text:p>
            <text:p/>
            <text:p>Older software control panel (44R0225 / 44R0222)</text:p>
            <text:p>08 E6 00 34 CRC: 34 83 </text:p>
          </table:table-cell>
          <table:table-cell table:style-name="ce13" office:value-type="string" calcext:value-type="string">
            <text:p><text:span text:style-name="T4">Information Update from System to IOT</text:span></text:p>
            <text:p/>
            <text:p><text:span text:style-name="T1">EB 10 08 E6 00 32 64 00 00 00 EB 00 21 01 60 00 3C 00 00 FF 13 00 02 00 02 00 0F 00 32 05 36 11 E4 00 00 00 00 00 00 00 00 0C 00 00 16 00 1E 02 CD 01 74 00 00 00 00 00 00 00 00 00 00 04 04 04 04 04 04 00 04 00 00 00 58 00 58 00 00 00 00 00 00 00 02 00 00 00 00 19 16 17 0F 00 00 00 00 00 00 00 00 00 00 00 00 00 00 00 00 06 B4 </text:span></text:p>
            <text:p><text:span text:style-name="T1">(x0 = EB x1 = 10, ect)</text:span></text:p>
            <text:p><text:span text:style-name="T1">x11 = Aircon in automatic cleaning mode</text:span></text:p>
            <text:p><text:span text:style-name="T1">x12 = Aircon Mode</text:span></text:p>
            <text:p><text:span text:style-name="T1">Heater = 0</text:span></text:p>
            <text:p><text:span text:style-name="T1">Cooler +1 (Off State)</text:span></text:p>
            <text:p><text:span text:style-name="T1">Cooler Manual +5</text:span></text:p>
            <text:p><text:span text:style-name="T1">Cooler Auto +7</text:span></text:p>
            <text:p><text:span text:style-name="T1">External Fan +9</text:span></text:p>
            <text:p><text:span text:style-name="T1">Values +0x20 or +0xA0 observed, unknown signal.</text:span></text:p>
            <text:p><text:span text:style-name="T1">x20 = Seems to be 1 when automatic cleaning mode (1 sample)</text:span></text:p>
            <text:p><text:span text:style-name="T1">x40 = Heater Mode</text:span></text:p>
            <text:p><text:span text:style-name="T1">heater code</text:span></text:p>
            <text:p><text:span text:style-name="T1">0 = other modes.</text:span></text:p>
            <text:p><text:span text:style-name="T1">+1 Heater Mode</text:span></text:p>
            <text:p><text:span text:style-name="T1">+3 Recycle Mode</text:span></text:p>
            <text:p/>
            <text:p><text:span text:style-name="T1">x42 = Heater Fan Speed</text:span></text:p>
            <text:p><text:span text:style-name="T1">x90 = Zone 2 Temp Target</text:span>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7">
          <table:table-cell table:style-name="ce6" table:number-columns-repeated="4"/>
          <table:table-cell table:style-name="ce13"/>
          <table:table-cell table:style-name="ce6"/>
          <table:table-cell table:style-name="ce12" office:value-type="string" calcext:value-type="string">
            <text:p/>
            <text:p>x14: right nibble fan speed</text:p>
            <text:p>left nibble, 0 when heater used.</text:p>
            <text:p>60 when ext fan or cooler mode.</text:p>
            <text:p>changed from 40 to 60 when on cooler auto mode. -didnt increment when set back to fan.</text:p>
            <text:p/>
            <text:p/>
            <text:p>x44 = Temp target for cooler and heater.</text:p>
            <text:p>x72,x74 = Changes with temp changes while on cooler.</text:p>
            <text:p/>
            <text:p>//Temp sensors - need to confirm, possible time delay, need to test under fan vent.</text:p>
            <text:p>x46 = Thermistor Temp</text:p>
            <text:p>x89 = Zone 2 Temp Sensor, updated from 97 03 02 17 0F BF AD while off, when fan mode enabled matches z1.</text:p>
            <text:p>x87 = Zone 1 temp sensor - only updating when system is online</text:p>
            <text:p>x88 = Unsure, seemed to match temp sensor until heater enabled changed to 0x10. possible thermistor temp?</text:p>
            <text:p/>
            <text:p/>
            <text:p>x80 = Zone State (Enabled/Disabled), LSB = Zone 1, 2nd LSB = Zone 2</text:p>
            <text:p>x82 = Zone 2 Enabled/Disabled (Need to double check, may just be same as x80 but value for Zone 2)</text:p>
            <text:p>(Ranges observed 0-3)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F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0 05 00 01</text:p>
          </table:table-cell>
          <table:table-cell table:style-name="ce10"/>
          <table:table-cell table:style-name="ce10" office:value-type="string" calcext:value-type="string">
            <text:p>Only observed during system installation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F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1 C1 0 7 </text:p>
          </table:table-cell>
          <table:table-cell table:style-name="ce10"/>
          <table:table-cell table:style-name="ce10" office:value-type="string" calcext:value-type="string">
            <text:p>Observed after startup of CP1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8">
          <table:table-cell table:style-name="ce10" office:value-type="string" calcext:value-type="string">
            <text:p>F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8" office:value-type="string" calcext:value-type="string">
            <text:p>Variable – During Idle is incrementing value.</text:p>
            <text:p/>
            <text:p>3 1F 0 6 C 0 C8 0 0 1 0 FF FF FF FF FF FF</text:p>
            <text:p>3 1F 0 6 C 0 C8 0 0 1 1 FF FF FF FF FF FF</text:p>
            <text:p>3 1F 0 6 C 0 C8 0 0 1 2 FF FF FF FF FF FF</text:p>
            <text:p/>
            <text:p>3 1F 0 6 C 0 C8 0 0 0 F3 FF FF FF FF FF FF</text:p>
            <text:p>3 1F 0 6 C 0 C8 0 0 0 F4 FF FF FF FF FF FF</text:p>
          </table:table-cell>
          <table:table-cell table:style-name="ce10"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" table:number-rows-repeated="5">
          <table:table-cell table:number-columns-repeated="4"/>
          <table:table-cell table:style-name="ce14"/>
          <table:table-cell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number-columns-repeated="4"/>
          <table:table-cell table:style-name="ce15"/>
          <table:table-cell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8" table:number-rows-repeated="2">
          <table:table-cell table:number-columns-repeated="7"/>
          <table:table-cell table:style-name="Default" table:number-columns-repeated="111"/>
          <table:table-cell table:style-name="ce7" table:number-columns-repeated="16266"/>
        </table:table-row>
        <table:table-row table:style-name="ro18" table:number-rows-repeated="1048521">
          <table:table-cell table:number-columns-repeated="118"/>
          <table:table-cell table:style-name="ce7" table:number-columns-repeated="16266"/>
        </table:table-row>
        <table:table-row table:style-name="ro18">
          <table:table-cell table:number-columns-repeated="118"/>
          <table:table-cell table:style-name="ce7" table:number-columns-repeated="16266"/>
        </table:table-row>
      </table:table>
      <table:named-expressions/>
      <table:database-ranges>
        <table:database-range table:name="__Anonymous_Sheet_DB__0" table:target-range-address="Sheet1.A1:Sheet1.G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20:16:13.43441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5T02:18:52</meta:creation-date>
    <meta:initial-creator>Mitchell Hayden</meta:initial-creator>
    <dc:language>en-AU</dc:language>
    <dc:date>2026-07-23T23:35:11.392423100</dc:date>
    <meta:editing-cycles>27</meta:editing-cycles>
    <meta:editing-duration>PT12H11M29S</meta:editing-duration>
    <meta:generator>LibreOffice/25.2.7.2$Windows_X86_64 LibreOffice_project/5cbfd1ab6520636bb5f7b99185aa69bd7456825d</meta:generator>
    <meta:document-statistic meta:table-count="1" meta:cell-count="278" meta:object-count="0"/>
    <meta:user-defined meta:name="AppVersion">15.0000</meta:user-defined>
  </office:meta>
</office:document-meta>
</file>